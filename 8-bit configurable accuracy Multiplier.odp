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TablePreview1.svm" manifest:media-type=""/>
  <manifest:file-entry manifest:full-path="Pictures/100000010000035C0000026D071E2181.png" manifest:media-type="image/png"/>
  <manifest:file-entry manifest:full-path="Pictures/100000010000037F00000341B92E6351.png" manifest:media-type="image/png"/>
  <manifest:file-entry manifest:full-path="Pictures/10000001000003DD000001622188E2F5.png" manifest:media-type="image/png"/>
  <manifest:file-entry manifest:full-path="Pictures/10000001000003C3000000B8CC01452A.png" manifest:media-type="image/png"/>
  <manifest:file-entry manifest:full-path="Pictures/1000000100000407000000DE1A2C8DDE.png" manifest:media-type="image/png"/>
  <manifest:file-entry manifest:full-path="Pictures/100000010000040A000001870FFD8015.png" manifest:media-type="image/png"/>
  <manifest:file-entry manifest:full-path="Pictures/100000000000031F0000032026285A87.jpg" manifest:media-type="image/jpeg"/>
  <manifest:file-entry manifest:full-path="Pictures/1000000100000404000000E88F18B720.png" manifest:media-type="image/png"/>
  <manifest:file-entry manifest:full-path="Pictures/TablePreview2.svm" manifest:media-type=""/>
  <manifest:file-entry manifest:full-path="Pictures/10000001000004CC000004370DA917AB.png" manifest:media-type="image/png"/>
  <manifest:file-entry manifest:full-path="Pictures/1000000100000332000002B2CEBFC3A0.png" manifest:media-type="image/png"/>
  <manifest:file-entry manifest:full-path="Pictures/100000010000055C0000036C3C84AAD7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5" style:family="graphic" style:parent-style-name="Graphics">
      <style:graphic-properties draw:stroke="none" draw:fill="none" style:mirror="none" loext:decorative="false"/>
    </style:style>
    <style:style style:name="gr6" style:family="graphic" style:parent-style-name="Object_20_with_20_no_20_fill_20_and_20_no_20_line">
      <style:graphic-properties draw:stroke="none" draw:fill="none" fo:clip="rect(0.336cm, 0cm, -0.026cm, 0.375cm)" style:mirror="none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41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Master1-Layout2-obj-Title-and-Content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6-titleOnly-Title-Only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6-titleOnly-Title-Only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212cm" style:use-optimal-column-width="false"/>
    </style:style>
    <style:style style:name="co2" style:family="table-column">
      <style:table-column-properties style:column-width="7.211cm" style:use-optimal-column-width="false"/>
    </style:style>
    <style:style style:name="co3" style:family="table-column">
      <style:table-column-properties style:column-width="5.276cm" style:use-optimal-column-width="false"/>
    </style:style>
    <style:style style:name="co4" style:family="table-column">
      <style:table-column-properties style:column-width="5.275cm" style:use-optimal-column-width="false"/>
    </style:style>
    <style:style style:name="ro1" style:family="table-row">
      <style:table-row-properties style:row-height="1.449cm" style:use-optimal-row-height="false"/>
    </style:style>
    <style:style style:name="ro2" style:family="table-row">
      <style:table-row-properties style:row-height="1.191cm" style:use-optimal-row-height="false"/>
    </style:style>
    <style:style style:name="ro3" style:family="table-row">
      <style:table-row-properties style:row-height="1.863cm" style:use-optimal-row-height="false"/>
    </style:style>
    <style:style style:name="ce1" style:family="table-cell">
      <loext:graphic-properties draw:textarea-vertical-align="top" fo:padding-top="0.127cm" fo:padding-bottom="0.127cm" fo:padding-left="0.254cm" fo:padding-right="0.254cm" style:writing-mode="lr-tb"/>
      <style:text-properties fo:font-size="20pt" style:font-size-asian="20pt" style:font-size-complex="20pt"/>
    </style:style>
    <style:style style:name="ce2" style:family="table-cell">
      <loext:graphic-properties draw:textarea-vertical-align="middle" fo:padding-top="0.018cm" fo:padding-bottom="0cm" fo:padding-left="0.018cm" fo:padding-right="0.018cm" style:writing-mode="lr-tb"/>
    </style:style>
    <style:style style:name="ce3" style:family="table-cell">
      <loext:graphic-properties draw:textarea-vertical-align="top" fo:padding-top="0.127cm" fo:padding-bottom="0.127cm" fo:padding-left="0.254cm" fo:padding-right="0.254cm" style:writing-mode="lr-tb"/>
    </style:style>
    <style:style style:name="ce4" style:family="table-cell">
      <loext:graphic-properties draw:textarea-vertical-align="top" fo:padding-top="0.127cm" fo:padding-bottom="0.127cm" fo:padding-left="0.254cm" fo:padding-right="0.254cm" style:writing-mode="lr-tb"/>
      <style:text-properties fo:font-size="15pt" style:font-size-asian="15pt" style:font-size-complex="15pt"/>
    </style:style>
    <style:style style:name="ce5" style:family="table-cell">
      <loext:graphic-properties draw:textarea-vertical-align="top" fo:padding-top="0.127cm" fo:padding-bottom="0.127cm" fo:padding-left="0.254cm" fo:padding-right="0.254cm" style:writing-mode="lr-tb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353cm" fo:margin-bottom="0cm" fo:line-height="240%" fo:text-align="start" fo:text-indent="-0.953cm" style:punctuation-wrap="hanging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.953cm" fo:margin-right="0cm" fo:margin-top="0.353cm" fo:margin-bottom="0cm" fo:line-height="200%" fo:text-align="start" fo:text-indent="-0.953cm" style:punctuation-wrap="hanging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fo:margin-left="0.953cm" fo:margin-right="0cm" fo:margin-top="0.353cm" fo:margin-bottom="0cm" fo:line-height="200%" fo:text-align="start" fo:text-indent="-0.953cm" style:punctuation-wrap="hanging" loext:tab-stop-distance="0cm" style:font-independent-line-spacing="true">
        <style:tab-stops/>
      </style:paragraph-properties>
    </style:style>
    <style:style style:name="T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T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Liberation Serif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erif" style:font-size-asian="20pt" style:font-style-asian="normal" style:font-weight-asian="normal" style:font-name-complex="Liberation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erif" style:font-size-asian="20pt" style:font-style-asian="normal" style:font-weight-asian="normal" style:font-name-complex="Liberation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9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404040" loext:opacity="100%" style:text-line-through-style="none" style:text-line-through-type="none" style:text-position="30% 67%" style:font-name="Trebuchet M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size="20pt" fo:language="en" fo:country="IN" style:font-size-asian="20pt" style:font-size-complex="20pt"/>
    </style:style>
    <style:style style:name="T13" style:family="text">
      <style:text-properties style:font-name="Liberation Serif" fo:font-size="20pt" fo:language="en" fo:country="IN" style:font-name-asian="Liberation Serif" style:font-size-asian="20pt" style:font-name-complex="Liberation Serif" style:font-size-complex="20pt"/>
    </style:style>
    <style:style style:name="T14" style:family="text">
      <style:text-properties fo:color="#000000" loext:opacity="100%" style:text-line-through-style="none" style:text-line-through-type="none" style:font-name="Trebuchet MS" fo:font-size="18pt" fo:language="en" fo:country="IN" fo:font-style="normal" style:text-underline-style="none" fo:font-weight="normal" style:text-underline-mode="continuous" style:text-overline-mode="continuous" style:text-line-through-mode="continuous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language="en" fo:country="IN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15pt" fo:language="en" fo:country="IN" style:font-size-asian="15pt" style:font-size-complex="15pt"/>
    </style:style>
    <style:style style:name="T18" style:family="text">
      <style:text-properties fo:font-size="16pt" fo:language="en" fo:country="IN" style:font-size-asian="16pt" style:font-size-complex="16pt"/>
    </style:style>
    <style:style style:name="T19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6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75cm" svg:height="4.573cm" svg:x="4.186cm" svg:y="6cm" presentation:class="title" presentation:user-transformed="true">
          <draw:text-box>
            <text:p text:style-name="P1"><text:span text:style-name="T1">8-bit configurable accuracy Multiplier</text:span></text:p>
          </draw:text-box>
        </draw:frame>
        <draw:frame draw:name="Subtitle 2" presentation:style-name="pr2" draw:text-style-name="P2" draw:layer="layout" svg:width="21.575cm" svg:height="4.927cm" svg:x="4.186cm" svg:y="10.573cm" presentation:class="subtitle" presentation:user-transformed="true">
          <draw:text-box>
            <text:p text:style-name="P3"><text:span text:style-name="T2">DVLSI Course Project 2025 </text:span></text:p>
            <text:p text:style-name="P3"><text:span text:style-name="T2">Amit Barman (27002)</text:span></text:p>
            <text:p text:style-name="P3"><text:span text:style-name="T2">Anuran Bhunia (26475)</text:span></text:p>
            <text:p text:style-name="P3"><text:span text:style-name="T3">Group ID 17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Design Methodology- Outline</text:span></text:p>
          </draw:text-box>
        </draw:frame>
        <draw:frame draw:name="Content Placeholder 2" presentation:style-name="pr5" draw:text-style-name="P6" draw:layer="layout" svg:width="24.619cm" svg:height="11.783cm" svg:x="1.881cm" svg:y="4.717cm" presentation:class="outline" presentation:user-transformed="true">
          <draw:text-box>
            <text:list text:style-name="L2">
              <text:list-item>
                <text:p text:style-name="P5"><text:span text:style-name="T5">Partial Product Generation using Wallace tree method </text:span><text:span text:style-name="T6">—</text:span><text:span text:style-name="T7"> </text:span><text:span text:style-name="T8">No optimization has been done in this stage</text:span></text:p>
              </text:list-item>
              <text:list-item>
                <text:p text:style-name="P5"><text:span text:style-name="T9">Optimizations done in the Accumulation stage using proprietary multimode configurable accuracy Adder</text:span></text:p>
              </text:list-item>
              <text:list-item>
                <text:p text:style-name="P5"><text:span text:style-name="T9">Error correction sequence is generated and added to get the Exact Multiplic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Design Methodology - Innovation</text:span></text:p>
          </draw:text-box>
        </draw:frame>
        <draw:frame draw:name="Content Placeholder 2" presentation:style-name="pr5" draw:text-style-name="P2" draw:layer="layout" svg:width="23.88cm" svg:height="12.5cm" svg:x="1.881cm" svg:y="4.5cm" presentation:class="outline" presentation:user-transformed="true">
          <draw:text-box>
            <text:list text:style-name="L2">
              <text:list-item>
                <text:p text:style-name="P5"><text:span text:style-name="T9">New Multimode Adder (MMA) designed to compute 4 bits at a time</text:span></text:p>
              </text:list-item>
              <text:list-item>
                <text:p text:style-name="P5"><text:span text:style-name="T9">In accurate mode, computes 3 bits like regular FA and passes the </text:span><text:span text:style-name="T9">4</text:span><text:span text:style-name="T10">th</text:span><text:span text:style-name="T9"> bit cleanly</text:span></text:p>
              </text:list-item>
              <text:list-item>
                <text:p text:style-name="P5"><text:span text:style-name="T9">In approximate mode, uses 4 bits to give an approximate answer </text:span></text:p>
                <text:p text:style-name="P5"><text:span text:style-name="T9"/></text:p>
              </text:list-item>
            </text:list>
            <text:p text:style-name="P5"><text:span text:style-name="T9"/></text:p>
          </draw:text-box>
        </draw:frame>
        <draw:frame draw:style-name="gr2" draw:text-style-name="P7" draw:layer="layout" svg:width="5.786cm" svg:height="0.627cm" svg:x="5.5cm" svg:y="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7" draw:layer="layout" svg:width="6.749cm" svg:height="0.68cm" svg:x="14cm" svg:y="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Multimode Adder (MMA)</text:span></text:p>
          </draw:text-box>
        </draw:frame>
        <draw:frame draw:style-name="gr3" draw:text-style-name="P7" draw:layer="layout" svg:width="19.201cm" svg:height="13.865cm" svg:x="4.5cm" svg:y="3.5cm" presentation:class="graphic" presentation:user-transformed="true">
          <draw:image xlink:href="Pictures/100000010000035C0000026D071E21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Stages in Accumulation- Stage I</text:span></text:p>
          </draw:text-box>
        </draw:frame>
        <draw:frame draw:name="Content Placeholder 4" draw:style-name="gr4" draw:text-style-name="P8" draw:layer="layout" svg:width="25.591cm" svg:height="9.16cm" svg:x="0.825cm" svg:y="6.124cm" presentation:class="graphic">
          <draw:image xlink:href="Pictures/10000001000003DD000001622188E2F5.png" xlink:type="simple" xlink:show="embed" xlink:actuate="onLoad" draw:mime-type="image/png">
            <text:p/>
          </draw:image>
          <svg:desc>A diagram of a number of squares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Stages in Accumulation- Stage II</text:span></text:p>
          </draw:text-box>
        </draw:frame>
        <draw:frame draw:name="Content Placeholder 4" draw:style-name="gr4" draw:text-style-name="P8" draw:layer="layout" svg:width="23.879cm" svg:height="4.562cm" svg:x="1.882cm" svg:y="7.244cm" presentation:class="graphic">
          <draw:image xlink:href="Pictures/10000001000003C3000000B8CC01452A.png" xlink:type="simple" xlink:show="embed" xlink:actuate="onLoad" draw:mime-type="image/png">
            <text:p/>
          </draw:image>
          <svg:desc>A group of circles with numbers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Approximate Calculation Stage</text:span></text:p>
          </draw:text-box>
        </draw:frame>
        <draw:frame draw:name="Content Placeholder 4" draw:style-name="gr4" draw:text-style-name="P8" draw:layer="layout" svg:width="23.879cm" svg:height="5.142cm" svg:x="2.721cm" svg:y="7.381cm" presentation:class="graphic">
          <draw:image xlink:href="Pictures/1000000100000407000000DE1A2C8DDE.png" xlink:type="simple" xlink:show="embed" xlink:actuate="onLoad" draw:mime-type="image/png">
            <text:p/>
          </draw:image>
          <svg:desc>A black and white image of a grid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Error Sequence Generation </text:span><text:span text:style-name="T4">and Correction</text:span></text:p>
          </draw:text-box>
        </draw:frame>
        <draw:frame draw:name="Content Placeholder 4" draw:style-name="gr4" draw:text-style-name="P8" draw:layer="layout" svg:width="18.644cm" svg:height="7.05cm" svg:x="4.5cm" svg:y="4.92cm" presentation:class="graphic">
          <draw:image xlink:href="Pictures/100000010000040A000001870FFD8015.png" xlink:type="simple" xlink:show="embed" xlink:actuate="onLoad" draw:mime-type="image/png">
            <text:p/>
          </draw:image>
          <svg:desc>A diagram of a computer code

AI-generated content may be incorrect.</svg:desc>
        </draw:frame>
        <draw:frame draw:name="Picture 6" draw:style-name="gr5" draw:text-style-name="P8" draw:layer="layout" svg:width="23.76cm" svg:height="5.362cm" svg:x="1.881cm" svg:y="12.516cm">
          <draw:image xlink:href="Pictures/1000000100000404000000E88F18B720.png" xlink:type="simple" xlink:show="embed" xlink:actuate="onLoad" draw:mime-type="image/png">
            <text:p/>
          </draw:image>
          <svg:desc>A white rectangular object with black text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11">Final schematic</text:span></text:p>
          </draw:text-box>
        </draw:frame>
        <draw:frame draw:name="Content Placeholder 3" draw:style-name="gr6" draw:text-style-name="P8" draw:layer="layout" svg:width="15.418cm" svg:height="15.534cm" svg:x="6.816cm" svg:y="3.516cm" presentation:class="graphic">
          <draw:image xlink:href="Pictures/100000000000031F0000032026285A87.jpg" xlink:type="simple" xlink:show="embed" xlink:actuate="onLoad" draw:mime-type="image/jpeg">
            <text:p/>
          </draw:image>
          <svg:desc>A diagram of a computer chip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5.5cm" svg:y="7.5cm" presentation:class="title" presentation:user-transformed="true">
          <draw:text-box>
            <text:p text:style-name="P1"><text:span text:style-name="T4">Key parameters</text:span></text:p>
          </draw:text-box>
        </draw:frame>
        <draw:frame draw:name="Content Placeholder 3" draw:style-name="gr7" draw:layer="layout" svg:width="14.422cm" svg:height="8.594cm" svg:x="1cm" svg:y="5.5cm" presentation:class="table" presentation:user-transformed="true">
          <table:table table:template-name="{5C22544A-7EE6-4342-B048-85BDC9FD1C3A}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2">Modes</text:span></text:p>
              </table:table-cell>
              <table:table-cell>
                <text:p text:style-name="P9"><text:span text:style-name="T12">Power in </text:span><text:span text:style-name="T13">μ</text:span><text:span text:style-name="T12">W</text:span></text:p>
              </table:table-cell>
            </table:table-row>
            <table:table-row table:style-name="ro2">
              <table:table-cell table:style-name="ce2">
                <text:p text:style-name="P10"><text:span text:style-name="T14">0</text:span></text:p>
              </table:table-cell>
              <table:table-cell table:style-name="ce3">
                <text:p text:style-name="P10"><text:span text:style-name="T15">572.11</text:span></text:p>
              </table:table-cell>
            </table:table-row>
            <table:table-row table:style-name="ro2">
              <table:table-cell table:style-name="ce2">
                <text:p text:style-name="P10"><text:span text:style-name="T14">1</text:span></text:p>
              </table:table-cell>
              <table:table-cell table:style-name="ce3">
                <text:p text:style-name="P10"><text:span text:style-name="T15">518.443</text:span></text:p>
              </table:table-cell>
            </table:table-row>
            <table:table-row table:style-name="ro2">
              <table:table-cell table:style-name="ce2">
                <text:p text:style-name="P10"><text:span text:style-name="T14">2</text:span></text:p>
              </table:table-cell>
              <table:table-cell table:style-name="ce3">
                <text:p text:style-name="P10"><text:span text:style-name="T15">512.887</text:span></text:p>
              </table:table-cell>
            </table:table-row>
            <table:table-row table:style-name="ro2">
              <table:table-cell table:style-name="ce2">
                <text:p text:style-name="P10"><text:span text:style-name="T14">3</text:span></text:p>
              </table:table-cell>
              <table:table-cell table:style-name="ce3">
                <text:p text:style-name="P10"><text:span text:style-name="T15">483.485</text:span></text:p>
              </table:table-cell>
            </table:table-row>
            <table:table-row table:style-name="ro2">
              <table:table-cell table:style-name="ce2">
                <text:p text:style-name="P10"><text:span text:style-name="T14">4</text:span></text:p>
              </table:table-cell>
              <table:table-cell table:style-name="ce3">
                <text:p text:style-name="P10"><text:span text:style-name="T15">385.036</text:span></text:p>
              </table:table-cell>
            </table:table-row>
            <table:table-row table:style-name="ro2">
              <table:table-cell table:style-name="ce2">
                <text:p text:style-name="P10"><text:span text:style-name="T14">5</text:span></text:p>
              </table:table-cell>
              <table:table-cell table:style-name="ce3">
                <text:p text:style-name="P10"><text:span text:style-name="T15">355.5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extBox 2" draw:style-name="gr8" draw:text-style-name="P2" draw:layer="layout" svg:width="8.687cm" svg:height="1.026cm" svg:x="3.813cm" svg:y="14.974cm">
          <draw:text-box>
            <text:p text:style-name="P1"><text:span text:style-name="T16">Worst case power vs modes</text:span></text:p>
          </draw:text-box>
        </draw:frame>
        <draw:frame draw:name="Content Placeholder 3" draw:style-name="gr7" draw:layer="layout" svg:width="10.55cm" svg:height="5.435cm" svg:x="16.032cm" svg:y="7.094cm">
          <table:table table:template-name="{5C22544A-7EE6-4342-B048-85BDC9FD1C3A}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11"><text:span text:style-name="T17">Process corner</text:span></text:p>
              </table:table-cell>
              <table:table-cell table:style-name="ce5">
                <text:p text:style-name="P12"><text:span text:style-name="T18">Minimum clock period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5">SS</text:span></text:p>
              </table:table-cell>
              <table:table-cell>
                <text:p text:style-name="P10"><text:span text:style-name="T15">2.8ns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5">TT</text:span></text:p>
              </table:table-cell>
              <table:table-cell>
                <text:p text:style-name="P10"><text:span text:style-name="T15">2ns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5">FF</text:span></text:p>
              </table:table-cell>
              <table:table-cell>
                <text:p text:style-name="P10"><text:span text:style-name="T15">1.2n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Box 5" draw:style-name="gr9" draw:text-style-name="P2" draw:layer="layout" svg:width="10.363cm" svg:height="1.795cm" svg:x="16cm" svg:y="12.705cm">
          <draw:text-box>
            <text:p text:style-name="P13"><text:span text:style-name="T16">Minimum clock period at various process corners</text:span></text:p>
          </draw:text-box>
        </draw:frame>
        <draw:frame draw:name="Title 2" presentation:style-name="pr4" draw:text-style-name="P2" draw:layer="layout" svg:width="23.88cm" svg:height="3.669cm" svg:x="1.62cm" svg:y="1.331cm" presentation:class="title" presentation:user-transformed="true">
          <draw:text-box>
            <text:p text:style-name="P1"><text:span text:style-name="T4">Key Parame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Results</text:span></text:p>
          </draw:text-box>
        </draw:frame>
        <draw:frame draw:name="Content Placeholder 6" draw:style-name="gr4" draw:text-style-name="P8" draw:layer="layout" svg:width="11.94cm" svg:height="10.491cm" svg:x="0.942cm" svg:y="5.362cm" presentation:class="graphic">
          <draw:image xlink:href="Pictures/10000001000004CC000004370DA917AB.png" xlink:type="simple" xlink:show="embed" xlink:actuate="onLoad" draw:mime-type="image/png">
            <text:p/>
          </draw:image>
          <svg:desc>A graph with a line

AI-generated content may be incorrect.</svg:desc>
        </draw:frame>
        <draw:frame draw:name="Picture 8" draw:style-name="gr5" draw:text-style-name="P8" draw:layer="layout" svg:width="13.592cm" svg:height="11.463cm" svg:x="13.109cm" svg:y="4.876cm">
          <draw:image xlink:href="Pictures/1000000100000332000002B2CEBFC3A0.png" xlink:type="simple" xlink:show="embed" xlink:actuate="onLoad" draw:mime-type="image/png">
            <text:p/>
          </draw:image>
          <svg:desc>A graph with different colored lines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18"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Results</text:span></text:p>
          </draw:text-box>
        </draw:frame>
        <draw:frame draw:name="Content Placeholder 4" draw:style-name="gr4" draw:text-style-name="P8" draw:layer="layout" svg:width="14.028cm" svg:height="9.75cm" svg:x="0.472cm" svg:y="4.65cm" presentation:class="graphic" presentation:user-transformed="true">
          <draw:image xlink:href="Pictures/100000010000055C0000036C3C84AAD7.png" xlink:type="simple" xlink:show="embed" xlink:actuate="onLoad" draw:mime-type="image/png">
            <text:p/>
          </draw:image>
          <svg:desc>A graph of different colored lines

AI-generated content may be incorrect.</svg:desc>
        </draw:frame>
        <draw:frame draw:name="Picture 6" draw:style-name="gr5" draw:text-style-name="P8" draw:layer="layout" svg:width="11.67cm" svg:height="9.845cm" svg:x="14.5cm" svg:y="4.959cm">
          <draw:image xlink:href="Pictures/100000010000037F00000341B92E6351.png" xlink:type="simple" xlink:show="embed" xlink:actuate="onLoad" draw:mime-type="image/png">
            <text:p/>
          </draw:image>
          <svg:desc>A graph with blue bars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3.88cm" svg:height="3.669cm" svg:x="1.881cm" svg:y="1.693cm" presentation:class="title">
          <draw:text-box>
            <text:p text:style-name="P1"><text:span text:style-name="T4">Results</text:span></text:p>
          </draw:text-box>
        </draw:frame>
        <draw:frame draw:name="Content Placeholder 2" presentation:style-name="pr7" draw:text-style-name="P15" draw:layer="layout" svg:width="23.88cm" svg:height="10.78cm" svg:x="1.881cm" svg:y="5cm" presentation:class="outline" presentation:user-transformed="true">
          <draw:text-box>
            <text:list text:style-name="L2">
              <text:list-item>
                <text:p text:style-name="P14"><text:span text:style-name="T9">The error increases more in higher modes due to more significant bits being approximated</text:span></text:p>
              </text:list-item>
              <text:list-item>
                <text:p text:style-name="P14"><text:span text:style-name="T9">Significant gains in Energy efficiency are observed</text:span></text:p>
              </text:list-item>
              <text:list-item>
                <text:p text:style-name="P14"><text:span text:style-name="T9">FoMs are plotted to have a better understanding the extent of accuracy trade-off for energy efficiency gai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6-titleOnly-Title-Only" presentation:presentation-page-layout-name="AL3T12">
        <draw:frame draw:name="Title 1" presentation:style-name="pr8" draw:text-style-name="P2" draw:layer="layout" svg:width="23.88cm" svg:height="3.669cm" svg:x="4.994cm" svg:y="7.691cm" presentation:class="title">
          <draw:text-box>
            <text:p text:style-name="P13"><text:span text:style-name="T19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3a500a" svg:stroke-opacity="100%" svg:stroke-linecap="round" draw:fill-color="#90c226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953" style:family="table-cell">
      <loext:graphic-properties draw:fill="solid" draw:fill-color="#eef4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954" style:family="table-cell"/>
    <style:style style:name="a955" style:family="table-cell">
      <loext:graphic-properties draw:fill="solid" draw:fill-color="#dbe9cd"/>
    </style:style>
    <style:style style:name="a956" style:family="table-cell"/>
    <style:style style:name="a957" style:family="table-cell">
      <loext:graphic-properties draw:fill="solid" draw:fill-color="#dbe9cd"/>
    </style:style>
    <style:style style:name="a958" style:family="table-cell">
      <loext:graphic-properties draw:fill="solid" draw:fill-color="#90c226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959" style:family="table-cell">
      <loext:graphic-properties draw:fill="solid" draw:fill-color="#90c226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960" style:family="table-cell">
      <loext:graphic-properties draw:fill="solid" draw:fill-color="#90c226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961" style:family="table-cell">
      <loext:graphic-properties draw:fill="solid" draw:fill-color="#90c226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958"/>
      <table:last-row table:style-name="a959"/>
      <table:first-column table:style-name="a960"/>
      <table:last-column table:style-name="a961"/>
      <table:body table:style-name="a953"/>
      <table:even-rows table:style-name="a956"/>
      <table:odd-rows table:style-name="a957"/>
      <table:even-columns table:style-name="a954"/>
      <table:odd-columns table:style-name="a955"/>
    </table:table-template>
    <style:style style:name="Master1-Facet-background" style:family="presentation">
      <style:graphic-properties draw:stroke="none" draw:fill="solid" draw:fill-color="#ffffff" draw:opacity="100%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false" style:shrink-to-fit="true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false" style:shrink-to-fit="true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false" style:shrink-to-fit="true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false" style:shrink-to-fit="true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false" style:shrink-to-fit="true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false" style:shrink-to-fit="true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false" style:shrink-to-fit="true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 loext:decorative="false"/>
    </style:style>
    <style:style style:name="Mgr5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 loext:decorative="false"/>
    </style:style>
    <style:style style:name="Mgr6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0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11-cust-Quot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2-cust-Name-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4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13-cust-Quote-Name-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0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4-cust-True-or-Fals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5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6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8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15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Master1-Layout16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2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3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7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8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9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10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2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3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loext:graphic-properties draw:fill="none"/>
      <style:paragraph-properties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Trebuchet MS" fo:font-size="9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loext:opacity="100%" style:text-line-through-style="none" style:text-line-through-type="none" style:text-position="0% 100%" style:font-name="Aria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318cm" text:min-label-width="0.635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Face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19" draw:style-name="Mgr4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ck to edit Master title styl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Click to edit Master text styles</text:span></text:p>
              <text:list>
                <text:list-item>
                  <text:p text:style-name="MP17"><text:span text:style-name="MT4">Second level</text:span></text:p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Facet-title" draw:layer="backgroundobjects" svg:width="19.798cm" svg:height="11.136cm" svg:x="0.6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31" draw:style-name="Mgr4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8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2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3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ck to edit Master title styl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ck to edit Master subtitle styl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ck to edit Master title styl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ck to edit Master title styl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Click to edit Master text styles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7" draw:style-name="Mgr3">
        <draw:connector draw:name="Straight Connector 8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ck to edit Master title styl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9" draw:style-name="Mgr3">
        <draw:connector draw:name="Straight Connector 10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ck to edit Master title styl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7">
            <text:list-item>
              <text:p text:style-name="MP23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5" draw:style-name="Mgr3">
        <draw:connector draw:name="Straight Connector 6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ck to edit Master title styl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4" draw:style-name="Mgr3">
        <draw:connector draw:name="Straight Connector 5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7" draw:style-name="Mgr3">
        <draw:connector draw:name="Straight Connector 8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ck to edit Master title styl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Click to edit Master text styles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7" draw:style-name="Mgr3">
        <draw:connector draw:name="Straight Connector 8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ck to edit Master title styl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ck icon to add picture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Click to edit Master text styles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Title-and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ck to edit Master title styl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Click to edit Master text styles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cust-Title-and-Caption-title" draw:layer="backgroundobjects" svg:width="0.001cm" svg:height="0.001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Quot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ck to edit Master title styl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Click to edit Master text styles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7">
            <text:list-item>
              <text:p text:style-name="MP23"><text:span text:style-name="MT3">Click to edit Master text styles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draw:frame draw:name="TextBox 19" draw:style-name="Mgr14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4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Quote-with-Caption-title" draw:layer="backgroundobjects" svg:width="0.001cm" svg:height="0.001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Name-C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ck to edit Master title styl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Click to edit Master text styles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12-cust-Name-Card-title" draw:layer="backgroundobjects" svg:width="0.001cm" svg:height="0.001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Quote-Name-C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ck to edit Master title styl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Click to edit Master text styles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10">Click to edit Master text styles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draw:frame draw:name="TextBox 23" draw:style-name="Mgr14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4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Quote-Name-Card-title" draw:layer="backgroundobjects" svg:width="0.001cm" svg:height="0.001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True-or-Fals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ck to edit Master title styl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Click to edit Master text styles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10">Click to edit Master text styles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14-cust-True-or-False-title" draw:layer="backgroundobjects" svg:width="0.001cm" svg:height="0.001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ck to edit Master title style</text:span></text:p>
        </draw:text-box>
      </draw:frame>
      <draw:frame draw:name="Vertical Text Placeholder 2" presentation:style-name="Mpr77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Click to edit Master text styles</text:span></text:p>
              <text:list>
                <text:list-item>
                  <text:p text:style-name="MP17"><text:span text:style-name="MT4">Second level</text:span></text:p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15-vertTx-Title-and-Vertical-Text-title" draw:layer="backgroundobjects" svg:width="0.001cm" svg:height="0.001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7" draw:style-name="Mgr4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5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8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12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3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15" draw:layer="backgroundobjects" svg:width="3.624cm" svg:height="14.587cm" svg:x="22.132cm" svg:y="1.693cm" presentation:class="title">
        <draw:text-box>
          <text:p text:style-name="MP14"><text:span text:style-name="MT2">Click to edit Master title style</text:span></text:p>
        </draw:text-box>
      </draw:frame>
      <draw:frame draw:name="Vertical Text Placeholder 2" presentation:style-name="Mpr82" draw:text-style-name="MP1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Click to edit Master text styles</text:span></text:p>
              <text:list>
                <text:list-item>
                  <text:p text:style-name="MP17"><text:span text:style-name="MT4">Second level</text:span></text:p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25-12-05">05/12/25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ber&gt;</text:page-number></text:span></text:p>
        </draw:text-box>
      </draw:frame>
      <presentation:notes style:page-layout-name="PM0">
        <draw:page-thumbnail presentation:style-name="Master1-Layout16-vertTitleAndTx-Vertical-Title-and-Text-title" draw:layer="backgroundobjects" svg:width="0.001cm" svg:height="0.001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3.2$Windows_X86_64 LibreOffice_project/8ca8d55c161d602844f5428fa4b58097424e324e</meta:generator>
    <dc:title/>
    <meta:initial-creator>Anuran Bhunia</meta:initial-creator>
    <meta:creation-date>2025-12-03T18:44:45Z</meta:creation-date>
    <dc:date>2025-12-05T12:08:42.682624200</dc:date>
    <meta:editing-cycles>17</meta:editing-cycles>
    <meta:editing-duration>PT10H37M54S</meta:editing-duration>
    <meta:document-statistic meta:object-count="461"/>
    <meta:template xlink:type="simple" xlink:actuate="onRequest" xlink:title="" xlink:href="Facet"/>
  </office:meta>
</office:document-meta>
</file>

<file path=Object 2/content.xml><?xml version="1.0" encoding="utf-8"?>
<math xmlns="http://www.w3.org/1998/Math/MathML" display="block">
  <semantics>
    <mrow>
      <mrow>
        <mtext>SUM</mtext>
        <mo stretchy="false">=</mo>
        <mover accent="true">
          <mi>A</mi>
          <mo stretchy="false">¯</mo>
        </mover>
      </mrow>
      <mi>.</mi>
      <mrow>
        <mi>B</mi>
        <mo stretchy="false">+</mo>
        <mi>A</mi>
      </mrow>
      <mi>.</mi>
      <mrow>
        <mover accent="true">
          <mi>B</mi>
          <mo stretchy="false">¯</mo>
        </mover>
        <mo stretchy="false">+</mo>
        <mi>C</mi>
      </mrow>
      <mi>.</mi>
      <mi>D</mi>
    </mrow>
    <annotation encoding="StarMath 5.0">"SUM" = bar{ A }.B + A.bar{ B } + C.D</annotation>
  </semantics>
</math>
</file>

<file path=Object 3/content.xml><?xml version="1.0" encoding="utf-8"?>
<math xmlns="http://www.w3.org/1998/Math/MathML" display="block">
  <semantics>
    <mrow>
      <mrow>
        <mtext>CARRY</mtext>
        <mo stretchy="false">=</mo>
        <mrow>
          <mo fence="true" form="prefix" stretchy="false">(</mo>
          <mrow>
            <mrow>
              <mover accent="true">
                <mi>A</mi>
                <mo stretchy="false">¯</mo>
              </mover>
              <mi>.</mi>
              <mrow>
                <mi>B</mi>
                <mo stretchy="false">+</mo>
                <mi>A</mi>
              </mrow>
              <mi>.</mi>
              <mover accent="true">
                <mi>B</mi>
                <mo stretchy="false">¯</mo>
              </mover>
            </mrow>
          </mrow>
          <mo fence="true" form="postfix" stretchy="false">)</mo>
        </mrow>
      </mrow>
      <mi>.</mi>
      <mi>C</mi>
      <mi>.</mi>
      <mi>D</mi>
    </mrow>
    <annotation encoding="StarMath 5.0">"CARRY" = ( bar{A}.B + A. bar{B} ).C.D</annotation>
  </semantics>
</math>
</file>